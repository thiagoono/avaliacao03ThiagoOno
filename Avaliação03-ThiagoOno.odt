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361FDCB0.png" manifest:media-type="image/png"/>
  <manifest:file-entry manifest:full-path="Pictures/1000000100000780000004389DE6705C.png" manifest:media-type="image/png"/>
  <manifest:file-entry manifest:full-path="Pictures/100000010000077D0000010E2AF5BA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9b785" officeooo:paragraph-rsid="0009b785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9b785" officeooo:paragraph-rsid="00218e77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0d3744" officeooo:paragraph-rsid="000d374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2e8a36"/>
    </style:style>
    <style:style style:name="P5" style:family="paragraph" style:parent-style-name="Standard">
      <style:paragraph-properties fo:text-align="justify" style:justify-single-word="false"/>
      <style:text-properties officeooo:paragraph-rsid="002f4183"/>
    </style:style>
    <style:style style:name="P6" style:family="paragraph" style:parent-style-name="Standard">
      <style:paragraph-properties fo:text-align="justify" style:justify-single-word="false"/>
      <style:text-properties officeooo:paragraph-rsid="00306f83"/>
    </style:style>
    <style:style style:name="P7" style:family="paragraph" style:parent-style-name="Standard">
      <style:paragraph-properties fo:text-align="justify" style:justify-single-word="false"/>
      <style:text-properties officeooo:rsid="0028132f" officeooo:paragraph-rsid="002653e6"/>
    </style:style>
    <style:style style:name="P8" style:family="paragraph" style:parent-style-name="Standard">
      <style:paragraph-properties fo:text-align="justify" style:justify-single-word="false"/>
      <style:text-properties officeooo:rsid="002e0e5e" officeooo:paragraph-rsid="002e0e5e"/>
    </style:style>
    <style:style style:name="P9" style:family="paragraph" style:parent-style-name="Standard">
      <style:paragraph-properties fo:text-align="justify" style:justify-single-word="false"/>
      <style:text-properties officeooo:rsid="002e0e5e" officeooo:paragraph-rsid="002f4183"/>
    </style:style>
    <style:style style:name="P10" style:family="paragraph" style:parent-style-name="Standard">
      <style:paragraph-properties fo:text-align="justify" style:justify-single-word="false"/>
      <style:text-properties officeooo:rsid="002e0e5e" officeooo:paragraph-rsid="00306f83"/>
    </style:style>
    <style:style style:name="P11" style:family="paragraph" style:parent-style-name="Standard">
      <style:paragraph-properties fo:text-align="justify" style:justify-single-word="false"/>
      <style:text-properties officeooo:rsid="002e8a36" officeooo:paragraph-rsid="002e8a36"/>
    </style:style>
    <style:style style:name="P12" style:family="paragraph" style:parent-style-name="Standard">
      <style:paragraph-properties fo:text-align="justify" style:justify-single-word="false"/>
      <style:text-properties officeooo:rsid="002e8a36" officeooo:paragraph-rsid="002f4183"/>
    </style:style>
    <style:style style:name="P13" style:family="paragraph" style:parent-style-name="Standard">
      <style:paragraph-properties fo:text-align="justify" style:justify-single-word="false"/>
      <style:text-properties officeooo:rsid="002e8a36" officeooo:paragraph-rsid="00306f83"/>
    </style:style>
    <style:style style:name="P14" style:family="paragraph" style:parent-style-name="Standard">
      <style:paragraph-properties fo:text-align="justify" style:justify-single-word="false"/>
      <style:text-properties officeooo:rsid="002f4183" officeooo:paragraph-rsid="002f4183"/>
    </style:style>
    <style:style style:name="P15" style:family="paragraph" style:parent-style-name="Standard">
      <style:paragraph-properties fo:text-align="start" style:justify-single-word="false"/>
      <style:text-properties officeooo:rsid="002f4183" officeooo:paragraph-rsid="002f4183"/>
    </style:style>
    <style:style style:name="P16" style:family="paragraph" style:parent-style-name="Standard">
      <style:paragraph-properties fo:text-align="justify" style:justify-single-word="false"/>
      <style:text-properties officeooo:rsid="00306f83" officeooo:paragraph-rsid="00306f83"/>
    </style:style>
    <style:style style:name="P17" style:family="paragraph" style:parent-style-name="Standard">
      <style:paragraph-properties fo:text-align="center" style:justify-single-word="false"/>
      <style:text-properties style:font-name="arial" officeooo:rsid="00327adf" officeooo:paragraph-rsid="00327adf"/>
    </style:style>
    <style:style style:name="P18" style:family="paragraph" style:parent-style-name="Standard">
      <style:paragraph-properties fo:text-align="center" style:justify-single-word="false"/>
      <style:text-properties style:font-name="arial" officeooo:rsid="0009b785" officeooo:paragraph-rsid="0009b785"/>
    </style:style>
    <style:style style:name="P19" style:family="paragraph" style:parent-style-name="Standard">
      <style:paragraph-properties fo:text-align="justify" style:justify-single-word="false"/>
      <style:text-properties officeooo:rsid="0028132f" officeooo:paragraph-rsid="0009b785"/>
    </style:style>
    <style:style style:name="T1" style:family="text">
      <style:text-properties style:text-position="super 58%"/>
    </style:style>
    <style:style style:name="T2" style:family="text">
      <style:text-properties officeooo:rsid="001946c5"/>
    </style:style>
    <style:style style:name="T3" style:family="text">
      <style:text-properties officeooo:rsid="00218e77"/>
    </style:style>
    <style:style style:name="T4" style:family="text">
      <style:text-properties officeooo:rsid="000d3744"/>
    </style:style>
    <style:style style:name="T5" style:family="text">
      <style:text-properties officeooo:rsid="002e0e5e"/>
    </style:style>
    <style:style style:name="T6" style:family="text">
      <style:text-properties officeooo:rsid="002e8a36"/>
    </style:style>
    <style:style style:name="T7" style:family="text">
      <style:text-properties officeooo:rsid="002f4183"/>
    </style:style>
    <style:style style:name="T8" style:family="text">
      <style:text-properties officeooo:rsid="00306f83"/>
    </style:style>
    <style:style style:name="T9" style:family="text">
      <style:text-properties officeooo:rsid="00327a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TECNOLÓGICA FEDERAL DO PARANÁ</text:p>
      <text:p text:style-name="P1"/>
      <text:p text:style-name="P1"/>
      <text:p text:style-name="P1"/>
      <text:p text:style-name="P1"/>
      <text:p text:style-name="P17">THIAGO KENJI NAKAMURA ON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4">ATIVIDADE </text:span><text:span text:style-name="T3">AVALIATIVA </text:span><text:span text:style-name="T9">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UARAPUAVA</text:p>
      <text:p text:style-name="P1">202<text:span text:style-name="T2">6</text:span></text:p>
      <text:p text:style-name="P1"/>
      <text:p text:style-name="P3"><text:soft-page-break/>ATIVIDADE <text:span text:style-name="T3">AVALIATIVA </text:span><text:span text:style-name="T9">3</text:span></text:p>
      <text:p text:style-name="P3">FUNDAMENTOS DE SISTEMAS COMPUTACIONAIS</text:p>
      <text:p text:style-name="P3">1<text:span text:style-name="T1">o</text:span>. semestre de 202<text:span text:style-name="T2">6</text:span></text:p>
      <text:p text:style-name="P19"/>
      <text:p text:style-name="P19"><draw:frame draw:style-name="fr2" draw:name="Image1" text:anchor-type="char" svg:x="0cm" svg:y="0.134cm" svg:width="16cm" svg:height="2.252cm" draw:z-index="0"><draw:image xlink:href="Pictures/100000010000077D0000010E2AF5BAB1.png" xlink:type="simple" xlink:show="embed" xlink:actuate="onLoad" draw:mime-type="image/png"/></draw:frame><draw:frame draw:style-name="fr2" draw:name="Image2" text:anchor-type="char" svg:x="0.035cm" svg:y="3.007cm" svg:width="16cm" svg:height="8.999cm" draw:z-index="1"><draw:image xlink:href="Pictures/1000000100000780000004389DE6705C.png" xlink:type="simple" xlink:show="embed" xlink:actuate="onLoad" draw:mime-type="image/png"/></draw:frame></text:p>
      <text:p text:style-name="P19"/>
      <text:p text:style-name="P19"><draw:frame draw:style-name="fr1" draw:name="Image3" text:anchor-type="char" svg:width="16cm" svg:height="8.999cm" draw:z-index="2"><draw:image xlink:href="Pictures/100000010000078000000438361FDCB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Estilo_20_padrão_20_de_20_desenho" style:display-name="Estilo padrão de desenh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Formas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Slide_20_de_20_Título_7e_LT_7e_Gliederung_20_1" style:display-name="Slide de Título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lide_20_de_20_Título_7e_LT_7e_Untertitel" style:display-name="Slide de Títul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lide_20_de_20_Título_7e_LT_7e_Notizen" style:display-name="Slide de Títul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lide_20_de_20_Título_7e_LT_7e_Hintergrundobjekte" style:display-name="Slide de Títul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lide_20_de_20_Título_7e_LT_7e_Hintergrund" style:display-name="Slide de Título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>
      <style:paragraph-properties fo:margin-top="0.4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.3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.1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nk_20_da_20_Internet" style:display-name="Link da Internet" style:family="paragraph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Ênfase_20_forte" style:display-name="Ênfase forte" style:family="paragraph"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Símbolos_20_de_20_numeração" style:display-name="Símbolos de numeração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Ênfase" style:family="paragraph"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Título_20_e_20_Conteúdo_7e_LT_7e_Gliederung_20_1" style:display-name="Título e Conteúdo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e_20_Conteúdo_7e_LT_7e_Untertitel" style:display-name="Título e Conteúd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e_20_Conteúdo_7e_LT_7e_Notizen" style:display-name="Título e Conteúd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e_20_Conteúdo_7e_LT_7e_Hintergrundobjekte" style:display-name="Título e Conteúd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_20_e_20_Conteúdo_7e_LT_7e_Hintergrund" style:display-name="Título e Conteúdo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omente_20_Título_7e_LT_7e_Gliederung_20_1" style:display-name="Somente Título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omente_20_Título_7e_LT_7e_Gliederung_20_2" style:display-name="Somente Título~LT~Gliederung 2" style:family="paragraph" style:parent-style-name="Somente_20_Título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omente_20_Título_7e_LT_7e_Gliederung_20_3" style:display-name="Somente Título~LT~Gliederung 3" style:family="paragraph" style:parent-style-name="Somente_20_Título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omente_20_Título_7e_LT_7e_Gliederung_20_4" style:display-name="Somente Título~LT~Gliederung 4" style:family="paragraph" style:parent-style-name="Somente_20_Título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omente_20_Título_7e_LT_7e_Gliederung_20_5" style:display-name="Somente Título~LT~Gliederung 5" style:family="paragraph" style:parent-style-name="Somente_20_Título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6" style:display-name="Somente Título~LT~Gliederung 6" style:family="paragraph" style:parent-style-name="Somente_20_Título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7" style:display-name="Somente Título~LT~Gliederung 7" style:family="paragraph" style:parent-style-name="Somente_20_Título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8" style:display-name="Somente Título~LT~Gliederung 8" style:family="paragraph" style:parent-style-name="Somente_20_Título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9" style:display-name="Somente Título~LT~Gliederung 9" style:family="paragraph" style:parent-style-name="Somente_20_Título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Titel" style:display-name="Somente Título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omente_20_Título_7e_LT_7e_Untertitel" style:display-name="Somente Títul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omente_20_Título_7e_LT_7e_Notizen" style:display-name="Somente Títul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omente_20_Título_7e_LT_7e_Hintergrundobjekte" style:display-name="Somente Títul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omente_20_Título_7e_LT_7e_Hintergrund" style:display-name="Somente Título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uas_20_Partes_20_de_20_Conteúdo_7e_LT_7e_Gliederung_20_1" style:display-name="Duas Partes de Conteúdo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uas_20_Partes_20_de_20_Conteúdo_7e_LT_7e_Gliederung_20_2" style:display-name="Duas Partes de Conteúdo~LT~Gliederung 2" style:family="paragraph" style:parent-style-name="Duas_20_Partes_20_de_20_Conteúdo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uas_20_Partes_20_de_20_Conteúdo_7e_LT_7e_Gliederung_20_3" style:display-name="Duas Partes de Conteúdo~LT~Gliederung 3" style:family="paragraph" style:parent-style-name="Duas_20_Partes_20_de_20_Conteúdo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uas_20_Partes_20_de_20_Conteúdo_7e_LT_7e_Gliederung_20_4" style:display-name="Duas Partes de Conteúdo~LT~Gliederung 4" style:family="paragraph" style:parent-style-name="Duas_20_Partes_20_de_20_Conteúdo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uas_20_Partes_20_de_20_Conteúdo_7e_LT_7e_Gliederung_20_5" style:display-name="Duas Partes de Conteúdo~LT~Gliederung 5" style:family="paragraph" style:parent-style-name="Duas_20_Partes_20_de_20_Conteúdo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6" style:display-name="Duas Partes de Conteúdo~LT~Gliederung 6" style:family="paragraph" style:parent-style-name="Duas_20_Partes_20_de_20_Conteúdo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7" style:display-name="Duas Partes de Conteúdo~LT~Gliederung 7" style:family="paragraph" style:parent-style-name="Duas_20_Partes_20_de_20_Conteúdo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8" style:display-name="Duas Partes de Conteúdo~LT~Gliederung 8" style:family="paragraph" style:parent-style-name="Duas_20_Partes_20_de_20_Conteúdo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9" style:display-name="Duas Partes de Conteúdo~LT~Gliederung 9" style:family="paragraph" style:parent-style-name="Duas_20_Partes_20_de_20_Conteúdo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Titel" style:display-name="Duas Partes de Conteúdo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uas_20_Partes_20_de_20_Conteúdo_7e_LT_7e_Untertitel" style:display-name="Duas Partes de Conteúd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uas_20_Partes_20_de_20_Conteúdo_7e_LT_7e_Notizen" style:display-name="Duas Partes de Conteúd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uas_20_Partes_20_de_20_Conteúdo_7e_LT_7e_Hintergrundobjekte" style:display-name="Duas Partes de Conteúd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uas_20_Partes_20_de_20_Conteúdo_7e_LT_7e_Hintergrund" style:display-name="Duas Partes de Conteúdo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mparação_7e_LT_7e_Gliederung_20_1" style:display-name="Comparação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mparação_7e_LT_7e_Gliederung_20_2" style:display-name="Comparação~LT~Gliederung 2" style:family="paragraph" style:parent-style-name="Comparação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mparação_7e_LT_7e_Gliederung_20_3" style:display-name="Comparação~LT~Gliederung 3" style:family="paragraph" style:parent-style-name="Comparação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mparação_7e_LT_7e_Gliederung_20_4" style:display-name="Comparação~LT~Gliederung 4" style:family="paragraph" style:parent-style-name="Comparação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mparação_7e_LT_7e_Gliederung_20_5" style:display-name="Comparação~LT~Gliederung 5" style:family="paragraph" style:parent-style-name="Comparação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ção_7e_LT_7e_Gliederung_20_6" style:display-name="Comparação~LT~Gliederung 6" style:family="paragraph" style:parent-style-name="Comparação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ção_7e_LT_7e_Gliederung_20_7" style:display-name="Comparação~LT~Gliederung 7" style:family="paragraph" style:parent-style-name="Comparação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ção_7e_LT_7e_Gliederung_20_8" style:display-name="Comparação~LT~Gliederung 8" style:family="paragraph" style:parent-style-name="Comparação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ção_7e_LT_7e_Gliederung_20_9" style:display-name="Comparação~LT~Gliederung 9" style:family="paragraph" style:parent-style-name="Comparação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ção_7e_LT_7e_Titel" style:display-name="Comparação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mparação_7e_LT_7e_Untertitel" style:display-name="Comparaçã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mparação_7e_LT_7e_Notizen" style:display-name="Comparaçã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mparação_7e_LT_7e_Hintergrundobjekte" style:display-name="Comparaçã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mparação_7e_LT_7e_Hintergrund" style:display-name="Comparação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beçalho_20_da_20_Seção_7e_LT_7e_Gliederung_20_1" style:display-name="Cabeçalho da Seção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abeçalho_20_da_20_Seção_7e_LT_7e_Gliederung_20_2" style:display-name="Cabeçalho da Seção~LT~Gliederung 2" style:family="paragraph" style:parent-style-name="Cabeçalho_20_da_20_Seção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abeçalho_20_da_20_Seção_7e_LT_7e_Gliederung_20_3" style:display-name="Cabeçalho da Seção~LT~Gliederung 3" style:family="paragraph" style:parent-style-name="Cabeçalho_20_da_20_Seção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abeçalho_20_da_20_Seção_7e_LT_7e_Gliederung_20_4" style:display-name="Cabeçalho da Seção~LT~Gliederung 4" style:family="paragraph" style:parent-style-name="Cabeçalho_20_da_20_Seção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abeçalho_20_da_20_Seção_7e_LT_7e_Gliederung_20_5" style:display-name="Cabeçalho da Seção~LT~Gliederung 5" style:family="paragraph" style:parent-style-name="Cabeçalho_20_da_20_Seção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7e_LT_7e_Gliederung_20_6" style:display-name="Cabeçalho da Seção~LT~Gliederung 6" style:family="paragraph" style:parent-style-name="Cabeçalho_20_da_20_Seção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7e_LT_7e_Gliederung_20_7" style:display-name="Cabeçalho da Seção~LT~Gliederung 7" style:family="paragraph" style:parent-style-name="Cabeçalho_20_da_20_Seção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7e_LT_7e_Gliederung_20_8" style:display-name="Cabeçalho da Seção~LT~Gliederung 8" style:family="paragraph" style:parent-style-name="Cabeçalho_20_da_20_Seção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7e_LT_7e_Gliederung_20_9" style:display-name="Cabeçalho da Seção~LT~Gliederung 9" style:family="paragraph" style:parent-style-name="Cabeçalho_20_da_20_Seção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7e_LT_7e_Titel" style:display-name="Cabeçalho da Seção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abeçalho_20_da_20_Seção_7e_LT_7e_Untertitel" style:display-name="Cabeçalho da Seçã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abeçalho_20_da_20_Seção_7e_LT_7e_Notizen" style:display-name="Cabeçalho da Seçã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abeçalho_20_da_20_Seção_7e_LT_7e_Hintergrundobjekte" style:display-name="Cabeçalho da Seçã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beçalho_20_da_20_Seção_7e_LT_7e_Hintergrund" style:display-name="Cabeçalho da Seção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beçalho_20_da_20_Seção_5f__7e_LT_7e_Gliederung_20_1" style:display-name="Cabeçalho da Seção_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abeçalho_20_da_20_Seção_5f__7e_LT_7e_Gliederung_20_2" style:display-name="Cabeçalho da Seção_~LT~Gliederung 2" style:family="paragraph" style:parent-style-name="Cabeçalho_20_da_20_Seção_5f_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abeçalho_20_da_20_Seção_5f__7e_LT_7e_Gliederung_20_3" style:display-name="Cabeçalho da Seção_~LT~Gliederung 3" style:family="paragraph" style:parent-style-name="Cabeçalho_20_da_20_Seção_5f_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abeçalho_20_da_20_Seção_5f__7e_LT_7e_Gliederung_20_4" style:display-name="Cabeçalho da Seção_~LT~Gliederung 4" style:family="paragraph" style:parent-style-name="Cabeçalho_20_da_20_Seção_5f_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abeçalho_20_da_20_Seção_5f__7e_LT_7e_Gliederung_20_5" style:display-name="Cabeçalho da Seção_~LT~Gliederung 5" style:family="paragraph" style:parent-style-name="Cabeçalho_20_da_20_Seção_5f_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5f__7e_LT_7e_Gliederung_20_6" style:display-name="Cabeçalho da Seção_~LT~Gliederung 6" style:family="paragraph" style:parent-style-name="Cabeçalho_20_da_20_Seção_5f_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5f__7e_LT_7e_Gliederung_20_7" style:display-name="Cabeçalho da Seção_~LT~Gliederung 7" style:family="paragraph" style:parent-style-name="Cabeçalho_20_da_20_Seção_5f_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5f__7e_LT_7e_Gliederung_20_8" style:display-name="Cabeçalho da Seção_~LT~Gliederung 8" style:family="paragraph" style:parent-style-name="Cabeçalho_20_da_20_Seção_5f_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5f__7e_LT_7e_Gliederung_20_9" style:display-name="Cabeçalho da Seção_~LT~Gliederung 9" style:family="paragraph" style:parent-style-name="Cabeçalho_20_da_20_Seção_5f_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5f__7e_LT_7e_Titel" style:display-name="Cabeçalho da Seção_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abeçalho_20_da_20_Seção_5f__7e_LT_7e_Untertitel" style:display-name="Cabeçalho da Seção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abeçalho_20_da_20_Seção_5f__7e_LT_7e_Notizen" style:display-name="Cabeçalho da Seção_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abeçalho_20_da_20_Seção_5f__7e_LT_7e_Hintergrundobjekte" style:display-name="Cabeçalho da Seção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beçalho_20_da_20_Seção_5f__7e_LT_7e_Hintergrund" style:display-name="Cabeçalho da Seção_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ítulo-e-Conteúdo_7e_LT_7e_Gliederung_20_1" style:display-name="Master1-Layout2-obj-Título-e-Conteúdo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ítulo-e-Conteúdo_7e_LT_7e_Gliederung_20_2" style:display-name="Master1-Layout2-obj-Título-e-Conteúdo~LT~Gliederung 2" style:family="paragraph" style:parent-style-name="Master1-Layout2-obj-Título-e-Conteúdo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ítulo-e-Conteúdo_7e_LT_7e_Gliederung_20_3" style:display-name="Master1-Layout2-obj-Título-e-Conteúdo~LT~Gliederung 3" style:family="paragraph" style:parent-style-name="Master1-Layout2-obj-Título-e-Conteúdo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ítulo-e-Conteúdo_7e_LT_7e_Gliederung_20_4" style:display-name="Master1-Layout2-obj-Título-e-Conteúdo~LT~Gliederung 4" style:family="paragraph" style:parent-style-name="Master1-Layout2-obj-Título-e-Conteúdo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e-Conteúdo_7e_LT_7e_Gliederung_20_5" style:display-name="Master1-Layout2-obj-Título-e-Conteúdo~LT~Gliederung 5" style:family="paragraph" style:parent-style-name="Master1-Layout2-obj-Título-e-Conteúdo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e-Conteúdo_7e_LT_7e_Gliederung_20_6" style:display-name="Master1-Layout2-obj-Título-e-Conteúdo~LT~Gliederung 6" style:family="paragraph" style:parent-style-name="Master1-Layout2-obj-Título-e-Conteúdo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e-Conteúdo_7e_LT_7e_Gliederung_20_7" style:display-name="Master1-Layout2-obj-Título-e-Conteúdo~LT~Gliederung 7" style:family="paragraph" style:parent-style-name="Master1-Layout2-obj-Título-e-Conteúdo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e-Conteúdo_7e_LT_7e_Gliederung_20_8" style:display-name="Master1-Layout2-obj-Título-e-Conteúdo~LT~Gliederung 8" style:family="paragraph" style:parent-style-name="Master1-Layout2-obj-Título-e-Conteúdo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e-Conteúdo_7e_LT_7e_Gliederung_20_9" style:display-name="Master1-Layout2-obj-Título-e-Conteúdo~LT~Gliederung 9" style:family="paragraph" style:parent-style-name="Master1-Layout2-obj-Título-e-Conteúdo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e-Conteúdo_7e_LT_7e_Titel" style:display-name="Master1-Layout2-obj-Título-e-Conteúdo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ítulo-e-Conteúdo_7e_LT_7e_Untertitel" style:display-name="Master1-Layout2-obj-Título-e-Conteúd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ítulo-e-Conteúdo_7e_LT_7e_Notizen" style:display-name="Master1-Layout2-obj-Título-e-Conteúd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ítulo-e-Conteúdo_7e_LT_7e_Hintergrundobjekte" style:display-name="Master1-Layout2-obj-Título-e-Conteúd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ítulo-e-Conteúdo_7e_LT_7e_Hintergrund" style:display-name="Master1-Layout2-obj-Título-e-Conteúdo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20:59:37.708020763</meta:creation-date>
    <meta:generator>LibreOffice/24.2.7.2$Linux_X86_64 LibreOffice_project/420$Build-2</meta:generator>
    <dc:date>2026-06-09T19:25:31.904274070</dc:date>
    <meta:editing-duration>PT1H20M24S</meta:editing-duration>
    <meta:editing-cycles>17</meta:editing-cycles>
    <meta:print-date>2026-06-09T19:24:16.560240906</meta:print-date>
    <meta:printed-by>PDF files</meta:printed-by>
    <meta:document-statistic meta:table-count="0" meta:image-count="3" meta:object-count="0" meta:page-count="2" meta:paragraph-count="8" meta:word-count="25" meta:character-count="183" meta:non-whitespace-character-count="166"/>
  </office:meta>
</office:document-meta>
</file>